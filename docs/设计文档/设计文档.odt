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546" officeooo:paragraph-rsid="00019546"/>
    </style:style>
    <style:style style:name="P2" style:family="paragraph" style:parent-style-name="Standard">
      <style:text-properties officeooo:rsid="0000f682" officeooo:paragraph-rsid="0000f682"/>
    </style:style>
    <style:style style:name="P3" style:family="paragraph" style:parent-style-name="Standard">
      <style:text-properties officeooo:rsid="00028329" officeooo:paragraph-rsid="00028329"/>
    </style:style>
    <style:style style:name="P4" style:family="paragraph" style:parent-style-name="Standard">
      <style:text-properties officeooo:rsid="000303da" officeooo:paragraph-rsid="000303da"/>
    </style:style>
    <style:style style:name="P5" style:family="paragraph" style:parent-style-name="Standard">
      <style:text-properties officeooo:rsid="0003f659" officeooo:paragraph-rsid="0003f659"/>
    </style:style>
    <style:style style:name="P6" style:family="paragraph" style:parent-style-name="Standard">
      <style:text-properties officeooo:rsid="0004ef67" officeooo:paragraph-rsid="0004ef67"/>
    </style:style>
    <style:style style:name="P7" style:family="paragraph" style:parent-style-name="Standard">
      <style:text-properties officeooo:rsid="0000f682" officeooo:paragraph-rsid="00069f92"/>
    </style:style>
    <style:style style:name="P8" style:family="paragraph" style:parent-style-name="Standard">
      <style:text-properties officeooo:rsid="00069f92" officeooo:paragraph-rsid="00069f92"/>
    </style:style>
    <style:style style:name="T1" style:family="text">
      <style:text-properties officeooo:rsid="000959a5"/>
    </style:style>
    <style:style style:name="T2" style:family="text">
      <style:text-properties officeooo:rsid="00019546"/>
    </style:style>
    <style:style style:name="T3" style:family="text">
      <style:text-properties officeooo:rsid="00069f92"/>
    </style:style>
    <style:style style:name="T4" style:family="text">
      <style:text-properties officeooo:rsid="0008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先看完原有的网络层代码，看是否有逻辑上的不衔接（列出每个类的职责）；我们还未解决粘包问题</text:p>
      <text:p text:style-name="P1">发现的问题：</text:p>
      <text:p text:style-name="P1"><text:span text:style-name="T1"><text:tab/>1.</text:span>TcpConnection的handleRead需要考虑消息格式的设计</text:p>
      <text:p text:style-name="P1"><text:span text:style-name="T1"><text:tab/>2.竞争条件，也就是在写套接字的时候，在多线程的情况下可能存在竞争套接字的情况。</text:span></text:p>
      <text:p text:style-name="P1"><text:tab/><text:span text:style-name="T1">3.读套接字</text:span></text:p>
      <text:p text:style-name="P1">2.再做概要概要设计，给出客户端和服务端的分层架构</text:p>
      <text:p text:style-name="P1">3.在详细设计中定义消息格式。解析后的消息类型。</text:p>
      <text:p text:style-name="P1"/>
      <text:p text:style-name="P1">概要设计</text:p>
      <text:p text:style-name="P2"/>
      <text:p text:style-name="P2">详细设计</text:p>
      <text:p text:style-name="P2">一、网络层</text:p>
      <text:p text:style-name="P2">网络层目前只提供TCP/ipv<text:span text:style-name="T2">4</text:span>网络服务</text:p>
      <text:p text:style-name="P2">自顶向下，各类职责如下：</text:p>
      <text:p text:style-name="P1">（1）TcpServer</text:p>
      <text:p text:style-name="P1">1.管理监听对象Acceptor，拥有其所有权；启动监听。</text:p>
      <text:p text:style-name="P1">2.管理tcp连接对象TcpConnection，拥有其所有权。</text:p>
      <text:p text:style-name="P3">3.与事件循环建立关联。</text:p>
      <text:p text:style-name="P3">4.负责处理添加新的连接，删除失效的连接。</text:p>
      <text:p text:style-name="P4">5.预留接口，将一条完成的消息传递给协议层。</text:p>
      <text:p text:style-name="P4">（2）Acceptor</text:p>
      <text:p text:style-name="P5">1.创建监听套接字，并由Socket去管理套接字生命周期</text:p>
      <text:p text:style-name="P5">2.有自己的channel,去向epoll启动监听读事件</text:p>
      <text:p text:style-name="P6">3.处理读事件，传参（连接套接字的描述符）给<text:span text:style-name="T2">TcpServer的添加新连接的回调函数。</text:span></text:p>
      <text:p text:style-name="P7">（<text:span text:style-name="T3">3</text:span>）<text:span text:style-name="T2">TcpConnection</text:span></text:p>
      <text:p text:style-name="P8">1.负责对套接字的读、写、关闭操作。这些操作将由channle进行回调调用。<text:line-break/><text:span text:style-name="T4">2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6:20:37.062755009</meta:creation-date>
    <dc:date>2026-05-07T13:06:46.468181978</dc:date>
    <meta:editing-duration>PT7H27M47S</meta:editing-duration>
    <meta:editing-cycles>6</meta:editing-cycles>
    <meta:generator>LibreOffice/26.2.3.2$Linux_X86_64 LibreOffice_project/620$Build-2</meta:generator>
    <meta:document-statistic meta:table-count="0" meta:image-count="0" meta:object-count="0" meta:page-count="1" meta:paragraph-count="24" meta:word-count="400" meta:character-count="527" meta:non-whitespace-character-count="523"/>
  </office:meta>
</office:document-meta>
</file>